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CC000003C35C161E3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 S11L3</text:p>
      <text:p text:style-name="P1"/>
      <text:p text:style-name="P1"><draw:frame draw:style-name="fr1" draw:name="immagini1" text:anchor-type="paragraph" svg:x="2.217cm" svg:y="0.859cm" svg:width="13.047cm" svg:height="10.231cm" draw:z-index="0"><draw:image xlink:href="Pictures/10000201000004CC000003C35C161E3C.png" xlink:type="simple" xlink:show="embed" xlink:actuate="onLoad"/></draw:frame>Analizzo il DNS <text:a xlink:type="simple" xlink:href="http://www.cisco.com/" text:style-name="Internet_20_link" text:visited-style-name="Visited_20_Internet_20_Link">www.cisco.com</text:a> con Wireshark</text:p>
      <text:p text:style-name="P1"/>
      <text:p text:style-name="P1"/>
      <text:p text:style-name="P2">Posso osservare che ha valori MAC di Destinatione: ZyxelCommuni_3f:dd:80 (64:dd:68:3f:dd:80)</text:p>
      <text:p text:style-name="P2">Sorgente: HewlettPacka_93:1f:eb (a0:48:1c:93:1f:eb)</text:p>
      <text:p text:style-name="P2">Mentre l'indirizzo IP di Origine è 192.168.1.82 e di destinazione 192.168.1.16</text:p>
      <text:p text:style-name="P2">La porta di origine è 60752</text:p>
      <text:p text:style-name="P2">La porta di destinazione è invece 5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stina  Chiumento </meta:initial-creator>
    <meta:creation-date>2026-06-17T17:32:43.75</meta:creation-date>
    <meta:document-statistic meta:table-count="0" meta:image-count="1" meta:object-count="0" meta:page-count="1" meta:paragraph-count="7" meta:word-count="45" meta:character-count="339"/>
    <dc:date>2026-06-17T17:46:38.28</dc:date>
    <dc:creator>Justina  Chiumento </dc:creator>
    <meta:editing-duration>PT13M56S</meta:editing-duration>
    <meta:editing-cycles>1</meta:editing-cycles>
    <meta:generator>OpenOffice/4.1.13$Win32 OpenOffice.org_project/4113m1$Build-9810</meta:generator>
  </office:meta>
</office:document-meta>
</file>